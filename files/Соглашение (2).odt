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49eb2" officeooo:paragraph-rsid="00149eb2"/>
    </style:style>
    <style:style style:name="P2" style:family="paragraph" style:parent-style-name="Standard">
      <style:text-properties fo:language="ru" fo:country="RU" officeooo:rsid="0015c652" officeooo:paragraph-rsid="0015c652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16ead8" officeooo:paragraph-rsid="0016ead8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197b12" officeooo:paragraph-rsid="001995f6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97b12" officeooo:paragraph-rsid="00197b12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97b12" officeooo:paragraph-rsid="001995f6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97b12" officeooo:paragraph-rsid="001b4e26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197b12" officeooo:paragraph-rsid="001995f6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197b12" officeooo:paragraph-rsid="001e09ea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16ead8" officeooo:paragraph-rsid="0021df56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ru" fo:country="RU" officeooo:rsid="00197b12" officeooo:paragraph-rsid="001e09ea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ru" fo:country="RU" officeooo:rsid="00197b12" officeooo:paragraph-rsid="0020f06f"/>
    </style:style>
    <style:style style:name="P13" style:family="paragraph" style:parent-style-name="Standard">
      <loext:graphic-properties draw:fill="none"/>
      <style:paragraph-properties fo:text-align="center" style:justify-single-word="false" fo:background-color="transparent"/>
      <style:text-properties fo:language="ru" fo:country="RU" officeooo:rsid="00197b12" officeooo:paragraph-rsid="0021df56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language="ru" fo:country="RU" officeooo:rsid="00197b12" officeooo:paragraph-rsid="001e09ea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97b12" officeooo:paragraph-rsid="001e09ea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97b12" officeooo:paragraph-rsid="0022a89c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22b11c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ru" fo:country="RU" officeooo:rsid="00197b12" officeooo:paragraph-rsid="001e09ea"/>
    </style:style>
    <style:style style:name="T1" style:family="text">
      <style:text-properties officeooo:rsid="0015c652"/>
    </style:style>
    <style:style style:name="T2" style:family="text">
      <style:text-properties officeooo:rsid="0016ead8"/>
    </style:style>
    <style:style style:name="T3" style:family="text">
      <style:text-properties officeooo:rsid="00197b12"/>
    </style:style>
    <style:style style:name="T4" style:family="text">
      <style:text-properties fo:language="ru" fo:country="RU" officeooo:rsid="0022a89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1pt"/>
    </style:style>
    <style:style style:name="T8" style:family="text">
      <style:text-properties fo:color="#000000" style:font-name="Arial1" fo:font-size="11pt" style:font-size-asian="12pt" style:font-size-complex="12pt"/>
    </style:style>
    <style:style style:name="T9" style:family="text">
      <style:text-properties fo:color="#000000" fo:font-size="11pt"/>
    </style:style>
    <style:style style:name="T10" style:family="text">
      <style:text-properties fo:color="#000000" officeooo:rsid="0022a89c"/>
    </style:style>
    <style:style style:name="T11" style:family="text">
      <style:text-properties fo:color="#000000" style:font-name="Times New Roman" fo:font-size="12pt" style:font-size-asian="12pt" style:font-size-complex="12pt"/>
    </style:style>
    <style:style style:name="T12" style:family="text">
      <style:text-properties fo:color="#000000" style:font-name="Times New Roman" fo:font-size="12pt" officeooo:rsid="0022a89c" style:font-size-asian="12pt" style:font-size-complex="12pt"/>
    </style:style>
    <style:style style:name="T13" style:family="text">
      <style:text-properties fo:color="#000000" style:font-name="Times New Roman" fo:font-size="11pt" style:font-size-asian="12pt" style:font-size-complex="12pt"/>
    </style:style>
    <style:style style:name="T14" style:family="text">
      <style:text-properties fo:color="#000000" style:font-name="Times New Roman" fo:font-size="13pt" style:font-size-asian="13pt" style:font-size-complex="13pt"/>
    </style:style>
    <style:style style:name="T15" style:family="text">
      <style:text-properties officeooo:rsid="0022a89c"/>
    </style:style>
    <style:style style:name="T16" style:family="text">
      <style:text-properties style:font-name="Times New Roman" fo:font-size="12pt" fo:language="ru" fo:country="RU" officeooo:rsid="0022a89c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глашение о порядке возврата сумм неосвоенного аванса </text:p>
      <text:p text:style-name="P1">по договору № <text:span text:style-name="T1">1 на выполнение отделочных работ</text:span></text:p>
      <text:p text:style-name="P1"/>
      <text:p text:style-name="P2">г. Москва<text:tab/><text:tab/><text:tab/><text:tab/><text:tab/><text:tab/><text:tab/><text:tab/><text:tab/>«___» июля 2026 г.</text:p>
      <text:p text:style-name="P2"/>
      <text:p text:style-name="P10">Мы, нижеподписавшиеся, Селезнев Александр Михайлович, далее именуемый «Заказчик», и Гусев Антон Александрович, далее именуемый «Исполнитель», <text:span text:style-name="T3">в связи с перечислением Заказчиком Исполнителю сумм аванса в размере 355 000 (Триста пятьдесят пять тысяч) рублей, выполнением Исполнителем <text:s/>демонтажных работ и отказом от выполнения иных работ, предусмотренных договором № 1 на выполнение отделочных работ (далее — Договор), заключили настоящее соглашение по о нижеследующем:</text:span></text:p>
      <text:p text:style-name="P3"/>
      <text:p text:style-name="P9">1. <text:s/>Исполнитель обязуется осуществить возврат Заказчику неосвоенный аванс в размере 280 000 (Двести восемьдесят тысяч) рублей по реквизитам, указанным в разделе <text:span text:style-name="T15">5</text:span> настоящего соглашения,в следующем порядке:</text:p>
      <text:p text:style-name="P5">1.1. <text:s/>70 000 (Семьдесят тысяч) рублей в течение 10 (десяти) дней после заключения настоящего соглашения;</text:p>
      <text:p text:style-name="P6">1.2. 55 000 (Пятьдесят пять тысяч) рублей в течение 40 (сорока) дней после заключения настоящего соглашения;</text:p>
      <text:p text:style-name="P6">1.3. 55 000 (Пятьдесят пять тысяч) рублей в течение 70 (семидесяти) дней после заключения настоящего соглашения;</text:p>
      <text:p text:style-name="P6">1.4. <text:s/>50 000 (Пятьдесят <text:s/>тысяч) рублей в течение 100 (ста) дней после заключения настоящего соглашения;</text:p>
      <text:p text:style-name="P7">1.5. <text:s/>50 000 (Пятьдесят <text:s/>тысяч) рублей в течение 130 (ста тридцати) дней после заключения настоящего соглашения.</text:p>
      <text:p text:style-name="P4"/>
      <text:p text:style-name="P8">2. В случае просрочки возврата вышеуказанных сумм с Исполнителя подлежит взысканию неустойка в размере 1% от просроченной к возврату суммы за каждый день просрочки.</text:p>
      <text:p text:style-name="P6"/>
      <text:p text:style-name="P15">3. В случае своевременного возврата суммы, указанной в п. 1 настоящего соглашения, Заказчик не будет предъявлять Исполнителю требования, предусмотренные пунктом 5 статьи 28 <text:s/>закона от 07.02.1992 № 2300-1 «О защите прав потребителей» (взыскания 3 % неустойки за каждый день просрочки исполнения работ, предусмотренных Договором).</text:p>
      <text:p text:style-name="P15"/>
      <text:p text:style-name="P17"><text:span text:style-name="T16">4. </text:span><text:span text:style-name="T11">Стороны признают, что направление скан-копии или фотографии </text:span><text:span text:style-name="T12">настоящего соглашения</text:span><text:span text:style-name="T11"> </text:span><text:span text:style-name="T14">с Telegram</text:span><text:span text:style-name="T8"> </text:span><text:span text:style-name="T11">подтверждает факт </text:span><text:span text:style-name="T12">его <text:s/></text:span><text:span text:style-name="T11">подписания соответствующей Стороной и согласование изложенных в нём условий.</text:span></text:p>
      <text:p text:style-name="P16"/>
      <text:p text:style-name="P13"><text:span text:style-name="T15">5</text:span>.Реквизиты и подписи Сторон:</text:p>
      <text:p text:style-name="P14"/>
      <text:p text:style-name="P14">Заказчик:<text:tab/><text:tab/><text:tab/><text:tab/><text:tab/><text:tab/><text:tab/>Исполнитель:</text:p>
      <text:p text:style-name="P11"><text:span text:style-name="T2">Селезнев Александр Михайлович</text:span> <text:tab/><text:tab/><text:tab/><text:tab/><text:span text:style-name="T2">Гусев Антон Александрович</text:span></text:p>
      <text:p text:style-name="P12">Телефон: 8-926-497-00-08<text:tab/><text:tab/><text:tab/> <text:s text:c="23"/>Телефон: 8-977-629-46-80</text:p>
      <text:p text:style-name="P11">Банк ВТБ (ПАО)<text:tab/><text:tab/><text:tab/><text:tab/><text:tab/><text:tab/> ИНН 773374163176</text:p>
      <text:p text:style-name="P12">Счет <text:span text:style-name="T2">карты</text:span> привязан к номеру телефона<text:tab/><text:tab/><text:tab/> зарегистрирован по адресу:</text:p>
      <text:p text:style-name="P12">Получатель Александр С.<text:tab/><text:tab/><text:tab/><text:tab/><text:tab/> г. Москва, ул. Фомичёвой,</text:p>
      <text:p text:style-name="P12"><text:tab/><text:tab/><text:tab/> <text:tab/><text:tab/><text:tab/> <text:s text:c="24"/>д. 8, корп.2, кв. 227</text:p>
      <text:p text:style-name="P12"/>
      <text:p text:style-name="P12"/>
      <text:p text:style-name="P12">__________/_______________/<text:tab/><text:tab/><text:tab/><text:tab/> __________/_______________/</text:p>
      <text:p text:style-name="P12"><text:s/><text:span text:style-name="T5">подпись</text:span> <text:s text:c="6"/><text:span text:style-name="T5">расшифровка подписи<text:tab/><text:tab/><text:tab/> <text:s text:c="34"/>подпись <text:s text:c="10"/>расшифровка подписи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7-10T14:34:40.343000000</meta:creation-date>
    <dc:date>2026-07-10T19:24:25.727000000</dc:date>
    <meta:editing-duration>PT19M6S</meta:editing-duration>
    <meta:editing-cycles>4</meta:editing-cycles>
    <meta:generator>Neat_Office/6.2.8.2$Windows_x86 LibreOffice_project/</meta:generator>
    <meta:document-statistic meta:table-count="0" meta:image-count="0" meta:object-count="0" meta:page-count="1" meta:paragraph-count="23" meta:word-count="325" meta:character-count="2605" meta:non-whitespace-character-count="2144"/>
  </office:meta>
</office:document-meta>
</file>